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Brix Slab Regular"/>
    </style:style>
    <style:style style:name="P2" style:family="paragraph" style:parent-style-name="Heading_20_3">
      <style:text-properties style:font-name="Brix Slab Regular"/>
    </style:style>
    <style:style style:name="P3" style:family="paragraph" style:parent-style-name="Heading_20_4">
      <style:text-properties style:font-name="Brix Slab Regular"/>
    </style:style>
    <style:style style:name="P4" style:family="paragraph" style:parent-style-name="Heading_20_5">
      <style:text-properties style:font-name="Brix Slab Regular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3">
      <style:text-properties style:font-name="Brix Slab Regular" fo:background-color="transparent"/>
    </style:style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officeooo:paragraph-rsid="00159587"/>
    </style:style>
    <style:style style:name="P13" style:family="paragraph" style:parent-style-name="Text_20_body" style:list-style-name="L4">
      <style:text-properties officeooo:paragraph-rsid="00159587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  <style:text-properties officeooo:paragraph-rsid="00169c60"/>
    </style:style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in" fo:margin-bottom="0in" style:contextual-spacing="false"/>
    </style:style>
    <style:style style:name="P19" style:family="paragraph" style:parent-style-name="Text_20_body" style:list-style-name="L7">
      <style:paragraph-properties fo:margin-top="0in" fo:margin-bottom="0in" style:contextual-spacing="false"/>
      <style:text-properties officeooo:paragraph-rsid="00169c60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in" fo:margin-bottom="0in" style:contextual-spacing="false"/>
    </style:style>
    <style:style style:name="P22" style:family="paragraph" style:parent-style-name="Text_20_body" style:list-style-name="L8">
      <style:paragraph-properties fo:margin-top="0in" fo:margin-bottom="0in" style:contextual-spacing="false"/>
      <style:text-properties officeooo:paragraph-rsid="00169c60"/>
    </style:style>
    <style:style style:name="P23" style:family="paragraph" style:parent-style-name="Text_20_body" style:list-style-name="L9"/>
    <style:style style:name="P24" style:family="paragraph" style:parent-style-name="Text_20_body" style:list-style-name="L9">
      <style:paragraph-properties fo:margin-top="0in" fo:margin-bottom="0in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in" fo:margin-bottom="0in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in" fo:margin-bottom="0in" style:contextual-spacing="false"/>
    </style:style>
    <style:style style:name="T1" style:family="text">
      <style:text-properties style:font-name="Brix Slab Regular"/>
    </style:style>
    <style:style style:name="T2" style:family="text">
      <style:text-properties style:font-name="Brix Slab Regular" officeooo:rsid="00126f52"/>
    </style:style>
    <style:style style:name="T3" style:family="text">
      <style:text-properties style:font-name="Brix Slab Regular" officeooo:rsid="00128f09"/>
    </style:style>
    <style:style style:name="T4" style:family="text">
      <style:text-properties style:font-name="Brix Slab Regular" fo:background-color="#ffff00" loext:char-shading-value="0"/>
    </style:style>
    <style:style style:name="T5" style:family="text">
      <style:text-properties style:font-name="Brix Slab Regular" officeooo:rsid="00169c60" fo:background-color="#ffff00" loext:char-shading-value="0"/>
    </style:style>
    <style:style style:name="T6" style:family="text">
      <style:text-properties style:font-name="Brix Slab Regular" officeooo:rsid="001a7d9d" fo:background-color="#ffff00" loext:char-shading-value="0"/>
    </style:style>
    <style:style style:name="T7" style:family="text">
      <style:text-properties style:font-name="Brix Slab Regular" officeooo:rsid="00137ca0"/>
    </style:style>
    <style:style style:name="T8" style:family="text">
      <style:text-properties style:font-name="Brix Slab Regular" officeooo:rsid="00154ec1"/>
    </style:style>
    <style:style style:name="T9" style:family="text">
      <style:text-properties style:font-name="Brix Slab Regular" officeooo:rsid="00159587"/>
    </style:style>
    <style:style style:name="T10" style:family="text">
      <style:text-properties style:font-name="Brix Slab Regular" officeooo:rsid="00169c60"/>
    </style:style>
    <style:style style:name="T11" style:family="text">
      <style:text-properties style:font-name="Brix Slab Regular" officeooo:rsid="001a3dca"/>
    </style:style>
    <style:style style:name="T12" style:family="text">
      <style:text-properties style:font-name="Brix Slab Regular" fo:background-color="transparent" loext:char-shading-value="0"/>
    </style:style>
    <style:style style:name="T13" style:family="text">
      <style:text-properties style:font-name="Brix Slab Regular" fo:background-color="transparent" loext:char-shading-value="0"/>
    </style:style>
    <style:style style:name="T14" style:family="text">
      <style:text-properties style:font-name="Brix Slab Regular" officeooo:rsid="001a7d9d" fo:background-color="transparent" loext:char-shading-value="0"/>
    </style:style>
    <style:style style:name="T15" style:family="text">
      <style:text-properties style:font-name="Brix Slab Regular" officeooo:rsid="001a7d9d" fo:background-color="transparent" loext:char-shading-value="0"/>
    </style:style>
    <style:style style:name="T16" style:family="text">
      <style:text-properties style:font-name="Brix Slab Regular" officeooo:rsid="00169c60" fo:background-color="transparent" loext:char-shading-value="0"/>
    </style:style>
    <style:style style:name="T17" style:family="text">
      <style:text-properties style:font-name="Brix Slab Regular" officeooo:rsid="00169c60" fo:background-color="transparent" loext:char-shading-value="0"/>
    </style:style>
    <style:style style:name="T18" style:family="text">
      <style:text-properties style:font-name="Brix Slab Regular" officeooo:rsid="001a7d9d"/>
    </style:style>
    <style:style style:name="T19" style:family="text">
      <style:text-properties style:font-name="Brix Slab Regular" fo:font-weight="normal" style:font-weight-asian="normal" style:font-weight-complex="normal"/>
    </style:style>
    <style:style style:name="T20" style:family="text">
      <style:text-properties style:font-name="Brix Slab Regular" officeooo:rsid="001c0f43"/>
    </style:style>
    <style:style style:name="T21" style:family="text">
      <style:text-properties officeooo:rsid="00126f52"/>
    </style:style>
    <style:style style:name="T22" style:family="text">
      <style:text-properties officeooo:rsid="00159587"/>
    </style:style>
    <style:style style:name="T23" style:family="text">
      <style:text-properties officeooo:rsid="001a3dca"/>
    </style:style>
    <style:style style:name="T24" style:family="text">
      <style:text-properties style:font-name="Brix Slab Regula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Datenblatt für die senseBox <text:span text:style-name="T23">MCU </text:span><text:span text:style-name="T21">Eye</text:span></text:h>
      <text:h text:style-name="P3" text:outline-level="4">Allgemeine Informationen</text:h>
      <text:list xml:id="list474006797" text:style-name="L1">
        <text:list-item>
          <text:p text:style-name="P6"><text:span text:style-name="Strong_20_Emphasis"><text:span text:style-name="T1">Modell:</text:span></text:span><text:span text:style-name="T1"> senseBox </text:span><text:span text:style-name="T11">MCU </text:span><text:span text:style-name="T2">Eye</text:span></text:p>
        </text:list-item>
        <text:list-item>
          <text:p text:style-name="P6"><text:span text:style-name="Strong_20_Emphasis"><text:span text:style-name="T1">Hersteller:</text:span></text:span><text:span text:style-name="T1"> Reedu GmbH &amp; Co. KG</text:span></text:p>
        </text:list-item>
        <text:list-item>
          <text:p text:style-name="P6"><text:span text:style-name="Strong_20_Emphasis"><text:span text:style-name="T1">Plattform:</text:span></text:span><text:span text:style-name="T1"> Arduino-kompatibel</text:span></text:p>
        </text:list-item>
        <text:list-item>
          <text:p text:style-name="P5"><text:span text:style-name="Strong_20_Emphasis"><text:span text:style-name="T1">Einsatzbereiche:</text:span></text:span><text:span text:style-name="T1"> Bildung, Citizen Science, Forschung, Umweltüberwachung, Smart City Anwendungen, </text:span><text:span text:style-name="T3">Bildverarbeitung, </text:span><text:span text:style-name="T20">Maschinelles Lernen</text:span></text:p>
        </text:list-item>
      </text:list>
      <text:h text:style-name="P3" text:outline-level="4">Technische Spezifikationen</text:h>
      <text:h text:style-name="P4" text:outline-level="5">Mikrocontroller</text:h>
      <text:list xml:id="list2458446135" text:style-name="L2">
        <text:list-item>
          <text:p text:style-name="P8"><text:span text:style-name="Strong_20_Emphasis"><text:span text:style-name="T1">Mikrocontroller:</text:span></text:span><text:span text:style-name="T1"> ESP32-S3 (Xtensa LX7 Dual-Core)</text:span></text:p>
        </text:list-item>
        <text:list-item>
          <text:p text:style-name="P8"><text:span text:style-name="Strong_20_Emphasis"><text:span text:style-name="T1">Architektur:</text:span></text:span><text:span text:style-name="T1"> </text:span><text:span text:style-name="T3">32-Bit</text:span></text:p>
        </text:list-item>
        <text:list-item>
          <text:p text:style-name="P8"><text:span text:style-name="Strong_20_Emphasis"><text:span text:style-name="T1">Taktfrequenz:</text:span></text:span><text:span text:style-name="T1"> Bis zu 240 MHz</text:span></text:p>
        </text:list-item>
        <text:list-item>
          <text:p text:style-name="P8"><text:span text:style-name="Strong_20_Emphasis"><text:span text:style-name="T1">Flash-Speicher:</text:span></text:span><text:span text:style-name="T1"> 16 MB</text:span></text:p>
        </text:list-item>
        <text:list-item>
          <text:p text:style-name="P8"><text:span text:style-name="Strong_20_Emphasis"><text:span text:style-name="T3">P</text:span></text:span><text:span text:style-name="Strong_20_Emphasis"><text:span text:style-name="T1">SRAM:</text:span></text:span><text:span text:style-name="T1"> 8 MB</text:span></text:p>
        </text:list-item>
        <text:list-item>
          <text:p text:style-name="P7"><text:span text:style-name="Strong_20_Emphasis"><text:span text:style-name="T1">EEPROM:</text:span></text:span><text:span text:style-name="T1"> Emuliert im Flash-Speicher</text:span></text:p>
        </text:list-item>
      </text:list>
      <text:h text:style-name="P4" text:outline-level="5">Stromversorgung</text:h>
      <text:list xml:id="list2505516413" text:style-name="L3">
        <text:list-item>
          <text:p text:style-name="P9"><text:span text:style-name="Strong_20_Emphasis"><text:span text:style-name="T1">Betriebsspannung:</text:span></text:span><text:span text:style-name="T1"> 5V</text:span></text:p>
        </text:list-item>
        <text:list-item>
          <text:p text:style-name="P9"><text:span text:style-name="Strong_20_Emphasis"><text:span text:style-name="T1">Stromversorgung:</text:span></text:span></text:p>
          <text:list>
            <text:list-item>
              <text:p text:style-name="P9"><text:span text:style-name="Strong_20_Emphasis"><text:span text:style-name="T1">USB:</text:span></text:span><text:span text:style-name="T1"> 5V über USB-</text:span><text:span text:style-name="T3">C</text:span><text:span text:style-name="T1">-Anschluss, auch zur Programmierung und Kommunikation</text:span></text:p>
            </text:list-item>
            <text:list-item>
              <text:p text:style-name="P9"><text:span text:style-name="Strong_20_Emphasis"><text:span text:style-name="T1">Extern:</text:span></text:span><text:span text:style-name="T1"> 5V über den VIN-Pin (empfohlene externe Stromquelle: 5V DC)</text:span></text:p>
            </text:list-item>
            <text:list-item>
              <text:p text:style-name="P9"><text:span text:style-name="Strong_20_Emphasis"><text:span text:style-name="T1">Maximale Spannung:</text:span></text:span><text:span text:style-name="T1"> </text:span><text:span text:style-name="T15">5</text:span><text:span text:style-name="T1">V (Achtung: Überschreiten kann die Platine beschädigen)</text:span></text:p>
            </text:list-item>
          </text:list>
        </text:list-item>
        <text:list-item>
          <text:p text:style-name="P9"><text:span text:style-name="Strong_20_Emphasis"><text:span text:style-name="T1">Stromaufnahme:</text:span></text:span></text:p>
          <text:list>
            <text:list-item>
              <text:p text:style-name="P10">Im Durchschnitt ca. 80 mA, abhängig von der aktiven Peripherie und dem Modus (WiFi, Bluetooth)</text:p>
            </text:list-item>
          </text:list>
        </text:list-item>
      </text:list>
      <text:h text:style-name="P4" text:outline-level="5">Schnittstellen</text:h>
      <text:list xml:id="list2735564306" text:style-name="L4">
        <text:list-item>
          <text:p text:style-name="P11"><text:span text:style-name="Strong_20_Emphasis"><text:span text:style-name="T1">Digitale I/O-Pins:</text:span></text:span><text:span text:style-name="T1"> </text:span><text:span text:style-name="T7">4 (davon werden standardmäßig 2 als I2C Schnittstelle genutzt)</text:span></text:p>
          <text:list>
            <text:list-item>
              <text:p text:style-name="P11"><text:span text:style-name="Strong_20_Emphasis"><text:span text:style-name="T1">PWM-Pins:</text:span></text:span><text:span text:style-name="T1"> Alle digitalen Pins können als PWM-Ausgänge konfigurier</text:span><text:span text:style-name="T7">t </text:span>werden</text:p>
            </text:list-item>
            <text:list-item>
              <text:p text:style-name="P11"><text:span text:style-name="Strong_20_Emphasis"><text:span text:style-name="T1">Maximaler Strom pro I/O-Pin:</text:span></text:span><text:span text:style-name="T1"> 40 mA</text:span></text:p>
            </text:list-item>
          </text:list>
        </text:list-item>
        <text:list-item>
          <text:p text:style-name="P11"><text:span text:style-name="Strong_20_Emphasis"><text:span text:style-name="T1">Analoge Eingänge:</text:span></text:span><text:span text:style-name="T1"> </text:span><text:span text:style-name="T7">4</text:span><text:span text:style-name="T1"> (1</text:span><text:span text:style-name="T7">2</text:span><text:span text:style-name="T1">-Bit Auflösung)</text:span></text:p>
          <text:list>
            <text:list-item>
              <text:p text:style-name="P11"><text:span text:style-name="Strong_20_Emphasis"><text:span text:style-name="T1">Analoge Eingangsbereiche:</text:span></text:span><text:span text:style-name="T1"> 0 bis 3.3V</text:span></text:p>
            </text:list-item>
          </text:list>
        </text:list-item>
        <text:list-item>
          <text:p text:style-name="P11"><text:span text:style-name="Strong_20_Emphasis"><text:span text:style-name="T1">Kommunikationsschnittstellen:</text:span></text:span></text:p>
          <text:list>
            <text:list-item>
              <text:p text:style-name="P11"><text:span text:style-name="Strong_20_Emphasis"><text:span text:style-name="T1">I2C:</text:span></text:span><text:span text:style-name="T1"> 1 Schnittstelle (fest zugewiesen auf </text:span><text:span text:style-name="T8">IO2</text:span><text:span text:style-name="T1"> (SDA) und </text:span><text:span text:style-name="T8">IO1</text:span><text:span text:style-name="T1"> (SCL))</text:span></text:p>
            </text:list-item>
          </text:list>
        </text:list-item>
        <text:list-item>
          <text:p text:style-name="P12"><text:span text:style-name="Strong_20_Emphasis"><text:span text:style-name="T1">USB:</text:span></text:span><text:span text:style-name="T1"> USB-C-Anschluss für Programmierung, Datenübertragung und </text:span>Stromversorgung</text:p>
        </text:list-item>
        <text:list-item>
          <text:p text:style-name="P12"><text:span text:style-name="Strong_20_Emphasis"><text:span text:style-name="T1">DVP Kamera Anschluss:</text:span></text:span><text:span text:style-name="T1"> </text:span><text:span text:style-name="T9">Kompatibel mit OV2640 (und ähnlichen Kameras)</text:span></text:p>
        </text:list-item>
        <text:list-item>
          <text:p text:style-name="P13"><text:span text:style-name="Strong_20_Emphasis"><text:span text:style-name="T9">Micro</text:span></text:span><text:span text:style-name="Strong_20_Emphasis"><text:span text:style-name="T1">SD-Karten-Slot:</text:span></text:span><text:span text:style-name="T1"> </text:span><text:span text:style-name="T9">F</text:span><text:span text:style-name="T1">ür externe Datenspeicherung (SDIO-Modus)</text:span></text:p>
        </text:list-item>
      </text:list>
      <text:h text:style-name="P4" text:outline-level="5">Erweiterungsanschlüsse und Sensor-Integration</text:h>
      <text:list xml:id="list1678831988" text:style-name="L5">
        <text:list-item>
          <text:p text:style-name="P15"><text:span text:style-name="Strong_20_Emphasis"><text:span text:style-name="T9">QWIIC</text:span></text:span><text:span text:style-name="Strong_20_Emphasis"><text:span text:style-name="T1">-Steckverbinder:</text:span></text:span><text:span text:style-name="T1"> Mehrere Ports zur einfachen Integration von </text:span>Sensoren und -Aktoren <text:span text:style-name="T22">(Stecktyp: JST-SH)</text:span></text:p>
        </text:list-item>
        <text:list-item>
          <text:p text:style-name="P15"><text:soft-page-break/><text:span text:style-name="Strong_20_Emphasis"><text:span text:style-name="T1">Kompatibilität:</text:span></text:span><text:span text:style-name="T1"> Unterstützt </text:span><text:span text:style-name="T10">diverse</text:span><text:span text:style-name="T1"> Sensoren</text:span></text:p>
        </text:list-item>
        <text:list-item>
          <text:p text:style-name="P14"><text:span text:style-name="Strong_20_Emphasis"><text:span text:style-name="T1">Pin-Kompatibilität:</text:span></text:span><text:span text:style-name="T1"> 3.3V kompatibel (die Pins sind nicht 5V tolerant)</text:span></text:p>
        </text:list-item>
      </text:list>
      <text:h text:style-name="P4" text:outline-level="5">Physische Eigenschaften</text:h>
      <text:list xml:id="list271251402" text:style-name="L6">
        <text:list-item>
          <text:p text:style-name="P16"><text:span text:style-name="Strong_20_Emphasis"><text:span text:style-name="T1">Abmessungen:</text:span></text:span><text:span text:style-name="T1"> </text:span><text:span text:style-name="T10">60</text:span><text:span text:style-name="T1"> mm x </text:span><text:span text:style-name="T10">30</text:span><text:span text:style-name="T1"> mm x </text:span><text:span text:style-name="T10">10</text:span><text:span text:style-name="T1"> mm (L x B x H)</text:span></text:p>
        </text:list-item>
        <text:list-item>
          <text:p text:style-name="P16"><text:span text:style-name="Strong_20_Emphasis"><text:span text:style-name="T1">Gewicht:</text:span></text:span><text:span text:style-name="T1"> Ca. </text:span><text:span text:style-name="T11">10</text:span><text:span text:style-name="T13"> Gramm</text:span></text:p>
        </text:list-item>
        <text:list-item>
          <text:p text:style-name="P16"><text:span text:style-name="Strong_20_Emphasis"><text:span text:style-name="T1">Betriebstemperaturbereich:</text:span></text:span><text:span text:style-name="T1"> </text:span><text:span text:style-name="T13">-</text:span><text:span text:style-name="T15">4</text:span><text:span text:style-name="T17">0</text:span><text:span text:style-name="T13">°C bis </text:span><text:span text:style-name="T15">6</text:span><text:span text:style-name="T17">5</text:span><text:span text:style-name="T13">°C</text:span></text:p>
        </text:list-item>
      </text:list>
      <text:h text:style-name="P4" text:outline-level="5">Eingebettete Funktionen</text:h>
      <text:list xml:id="list317704033" text:style-name="L7">
        <text:list-item>
          <text:p text:style-name="P18"><text:span text:style-name="Strong_20_Emphasis"><text:span text:style-name="T1">Bootloader:</text:span></text:span><text:span text:style-name="T1"> </text:span><text:span text:style-name="T1">Arduino-kompatibel, ermöglicht einfache Programmierung über die Arduino-IDE und andere Entwicklungsumgebungen wie ESP-IDF</text:span></text:p>
        </text:list-item>
        <text:list-item>
          <text:p text:style-name="P19"><text:span text:style-name="Strong_20_Emphasis"><text:span text:style-name="T1">ADC:</text:span></text:span><text:span text:style-name="T1"> 1</text:span><text:span text:style-name="T10">2</text:span><text:span text:style-name="T1">-Bit A/D-Wandler für analoge Eingänge, ermöglicht präzise Messungen</text:span></text:p>
        </text:list-item>
        <text:list-item>
          <text:p text:style-name="P17"><text:span text:style-name="Strong_20_Emphasis"><text:span text:style-name="T1">Low-Power-Modus:</text:span></text:span><text:span text:style-name="T1"> Verschiedene Energiesparmodi, um den Stromverbrauch zu </text:span>minimieren</text:p>
        </text:list-item>
      </text:list>
      <text:h text:style-name="P3" text:outline-level="4">Anwendungsbereiche</text:h>
      <text:list xml:id="list52701871" text:style-name="L8">
        <text:list-item>
          <text:p text:style-name="P21"><text:span text:style-name="Strong_20_Emphasis"><text:span text:style-name="T1">Bildung:</text:span></text:span><text:span text:style-name="T1"> Ideal für den Unterricht in Elektronik, Programmierung, </text:span><text:span text:style-name="T18">Maschinellem Lernen</text:span><text:span text:style-name="T1"> und Umweltsensorik, inklusive praktischer Projekte und Experimente</text:span></text:p>
        </text:list-item>
        <text:list-item>
          <text:p text:style-name="P21"><text:span text:style-name="Strong_20_Emphasis"><text:span text:style-name="T1">Citizen Science:</text:span></text:span><text:span text:style-name="T1"> Ermöglicht Bürgerwissenschaftlern, Umweltdaten zu sammeln und zu analysieren, z.B. Luftqualität, Wetterdaten</text:span></text:p>
        </text:list-item>
        <text:list-item>
          <text:p text:style-name="P21"><text:span text:style-name="Strong_20_Emphasis"><text:span text:style-name="T1">Umweltüberwachung:</text:span></text:span><text:span text:style-name="T1"> In stationären und mobilen Umweltsensorplattformen zur Überwachung von Temperatur, Luftfeuchtigkeit, Licht, UV-Strahlung und mehr</text:span></text:p>
        </text:list-item>
        <text:list-item>
          <text:p text:style-name="P22"><text:span text:style-name="Strong_20_Emphasis"><text:span text:style-name="T1">Forschung:</text:span></text:span><text:span text:style-name="T1"> Unterstützt wissenschaftliche Projekte durch präzise Datenerfassung und flexible Integration von Sensoren und Aktoren</text:span></text:p>
        </text:list-item>
        <text:list-item>
          <text:p text:style-name="P22"><text:span text:style-name="Strong_20_Emphasis"><text:span text:style-name="T1">Smart City:</text:span></text:span><text:span text:style-name="T1"> Integration in Smart City Projekte zur Überwachung von Umweltparametern, Verkehrsdaten und zur Steuerung städtischer Infrastrukturen</text:span></text:p>
        </text:list-item>
        <text:list-item>
          <text:p text:style-name="P20"><text:span text:style-name="Strong_20_Emphasis"><text:span text:style-name="T10">Bildverarbeitung</text:span></text:span><text:span text:style-name="Strong_20_Emphasis"><text:span text:style-name="T1">: </text:span></text:span><text:span text:style-name="Strong_20_Emphasis"><text:span text:style-name="T19">Eignet sich für Projekte im Bereich der computergestützten Bildanalyse.</text:span></text:span></text:p>
        </text:list-item>
      </text:list>
      <text:h text:style-name="P3" text:outline-level="4">Sicherheits- und Nutzungsrichtlinien</text:h>
      <text:list xml:id="list4136591397" text:style-name="L9">
        <text:list-item>
          <text:p text:style-name="P24"><text:span text:style-name="Strong_20_Emphasis"><text:span text:style-name="T1">Elektrische Sicherheit:</text:span></text:span></text:p>
          <text:list>
            <text:list-item>
              <text:p text:style-name="P24"><text:span text:style-name="Strong_20_Emphasis"><text:span text:style-name="T1">Maximale Eingangsspannung:</text:span></text:span><text:span text:style-name="T1"> Vin-Pin nicht über 5V versorgen, da die </text:span>Pins nur für 3.3V ausgelegt sind</text:p>
            </text:list-item>
            <text:list-item>
              <text:p text:style-name="P24"><text:span text:style-name="Strong_20_Emphasis"><text:span text:style-name="T1">Kurzschlussvermeidung:</text:span></text:span><text:span text:style-name="T1"> Vorsichtiger Umgang mit den Pins und </text:span>Verbindungen zur Vermeidung von Kurzschlüssen</text:p>
            </text:list-item>
          </text:list>
        </text:list-item>
        <text:list-item>
          <text:p text:style-name="P24"><text:span text:style-name="Strong_20_Emphasis"><text:span text:style-name="T1">Wärmemanagement:</text:span></text:span></text:p>
          <text:list>
            <text:list-item>
              <text:p text:style-name="P24"><text:span text:style-name="Strong_20_Emphasis"><text:span text:style-name="T1">Belüftung:</text:span></text:span><text:span text:style-name="T1"> Sorgen Sie für ausreichende </text:span><text:span text:style-name="T10">Kühlung und</text:span><text:span text:style-name="T1"> Belüftung, insbesondere bei hoher </text:span><text:span text:style-name="T10">Rechenlast</text:span><text:span text:style-name="T1"> oder Außeneinsatz bei hohen Temperaturen.</text:span></text:p>
            </text:list-item>
          </text:list>
        </text:list-item>
        <text:list-item>
          <text:p text:style-name="P24"><text:span text:style-name="Strong_20_Emphasis"><text:span text:style-name="T1">Umgang mit empfindlichen Komponenten:</text:span></text:span></text:p>
          <text:list>
            <text:list-item>
              <text:p text:style-name="P24"><text:span text:style-name="Strong_20_Emphasis"><text:span text:style-name="T1">Elektrostatische Entladung (ESD):</text:span></text:span><text:span text:style-name="T1"> Verwenden Sie antistatische Armbänder und ESD-Schutzmatten beim Umgang mit der Platine, um Beschädigungen zu vermeiden.</text:span></text:p>
            </text:list-item>
          </text:list>
        </text:list-item>
        <text:list-item>
          <text:p text:style-name="P24"><text:span text:style-name="Strong_20_Emphasis"><text:span text:style-name="T1">Umweltschutz:</text:span></text:span></text:p>
          <text:list>
            <text:list-item>
              <text:p text:style-name="P23"><text:span text:style-name="Strong_20_Emphasis"><text:span text:style-name="T1">Feuchtigkeitsschutz:</text:span></text:span><text:span text:style-name="T1"> Vermeiden Sie den Einsatz in extrem feuchten Umgebungen oder unter Wasser ohne entsprechende Schutzgehäuse.</text:span></text:p>
            </text:list-item>
          </text:list>
        </text:list-item>
      </text:list>
      <text:h text:style-name="P3" text:outline-level="4"><text:soft-page-break/>Verpackung und Lieferung</text:h>
      <text:list xml:id="list3258440094" text:style-name="L10">
        <text:list-item>
          <text:p text:style-name="P26"><text:span text:style-name="Strong_20_Emphasis"><text:span text:style-name="T1">Lieferumfang:</text:span></text:span><text:span text:style-name="T1"> senseBox </text:span><text:span text:style-name="T11">MCU </text:span><text:span text:style-name="T10">Eye, </text:span><text:span text:style-name="T18">OV2640</text:span></text:p>
        </text:list-item>
        <text:list-item>
          <text:p text:style-name="P25"><text:span text:style-name="Strong_20_Emphasis"><text:span text:style-name="T1">Verpackung:</text:span></text:span><text:span text:style-name="T1"> Antistatische Verpackung zum Schutz vor elektrostatischen Entladungen, robuste Verpackung für sicheren Transport</text:span></text:p>
        </text:list-item>
      </text:list>
      <text:h text:style-name="P3" text:outline-level="4">Hinweise und Empfehlungen</text:h>
      <text:list xml:id="list1258879675" text:style-name="L11">
        <text:list-item>
          <text:p text:style-name="P28"><text:span text:style-name="Strong_20_Emphasis"><text:span text:style-name="T1">Software &amp; Programmierung:</text:span></text:span></text:p>
          <text:list>
            <text:list-item>
              <text:p text:style-name="P28"><text:span text:style-name="Strong_20_Emphasis"><text:span text:style-name="T1">Arduino IDE:</text:span></text:span><text:span text:style-name="T1"> Unterstützt die Entwicklung von Anwendungen mit </text:span><text:span text:style-name="T10">ESP-IDF und der </text:span><text:span text:style-name="T1">Arduino-IDE, inklusive Bibliotheken für Sensoren und Aktoren</text:span></text:p>
            </text:list-item>
            <text:list-item>
              <text:p text:style-name="P28"><text:span text:style-name="Strong_20_Emphasis"><text:span text:style-name="T1">Online-Ressourcen:</text:span></text:span><text:span text:style-name="T1"> </text:span><text:span text:style-name="T13">Umfangreiche Dokumentation, Tutorials und Forenbeiträge sind verfügbar, um Benutzer bei der Entwicklung und Implementierung von Projekten zu unterstützen</text:span></text:p>
            </text:list-item>
          </text:list>
        </text:list-item>
        <text:list-item>
          <text:p text:style-name="P28"><text:span text:style-name="Strong_20_Emphasis"><text:span text:style-name="T1">Erweiterungsmöglichkeiten:</text:span></text:span></text:p>
          <text:list>
            <text:list-item>
              <text:p text:style-name="P28"><text:span text:style-name="Strong_20_Emphasis"><text:span text:style-name="T1">Sensoren:</text:span></text:span><text:span text:style-name="T1"> Breite Palette an kompatiblen Sensoren und Aktoren verfügbar, z.B. für Wetterüberwachung, Luftqualität, Wassersensorik</text:span></text:p>
            </text:list-item>
            <text:list-item>
              <text:p text:style-name="P27"><text:span text:style-name="Strong_20_Emphasis"><text:span text:style-name="T1">Kommunikationsmodule:</text:span></text:span><text:span text:style-name="T1"> WiFi, Bluetooth, </text:span><text:span text:style-name="T10">&amp; </text:span><text:span text:style-name="T1">LoRa </text:span><text:span text:style-name="T10">integriert</text:span></text:p>
            </text:list-item>
          </text:list>
        </text:list-item>
      </text:list>
      <text:p text:style-name="P1"/>
      <text:p text:style-name="Text_20_body"><text:span text:style-name="Strong_20_Emphasis"><text:span text:style-name="T1">Hinweis:</text:span></text:span><text:span text:style-name="T1"> Dieses Datenblatt bietet eine umfassende Übersicht über die technischen Spezifikationen, Funktionen und Anwendungsmöglichkeiten der senseBox </text:span><text:span text:style-name="T11">MCU </text:span><text:span text:style-name="T10">Eye</text:span><text:span text:style-name="T1">. Für spezifische Anwendungen und detaillierte technische Informationen wird empfohlen, die vollständige technische Dokumentation sowie die Benutzerhandbücher zu konsultier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1:30:38.478292514</meta:creation-date>
    <dc:date>2026-06-22T12:45:33.587155406</dc:date>
    <meta:editing-duration>PT45M1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3" meta:paragraph-count="73" meta:word-count="614" meta:character-count="4832" meta:non-whitespace-character-count="4350"/>
  </office:meta>
</office:document-meta>
</file>